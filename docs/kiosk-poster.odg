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-Serif" svg:font-family="Liberation-Serif"/>
    <style:font-face style:name="LiberationSerif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99999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1a1a1a" loext:opacity="100%" style:font-name="LiberationSerif" fo:font-size="17pt" fo:font-weight="bold" style:font-name-asian="LiberationSerif" style:font-size-asian="17pt" style:font-weight-asian="bold" style:font-name-complex="LiberationSerif" style:font-size-complex="17pt" style:font-weight-complex="bold"/>
    </style:style>
    <style:style style:name="T2" style:family="text">
      <style:text-properties fo:color="#1a1a1a" loext:opacity="100%" style:font-name="Liberation-Serif" fo:font-size="10.5pt" fo:font-weight="normal" style:font-name-asian="Liberation-Serif" style:font-size-asian="10.5pt" style:font-weight-asian="normal" style:font-name-complex="Liberation-Serif" style:font-size-complex="10.5pt" style:font-weight-complex="normal"/>
    </style:style>
    <style:style style:name="T3" style:family="text">
      <style:text-properties fo:color="#444444" loext:opacity="100%" style:font-name="LiberationSerif" fo:font-size="10.5pt" fo:font-style="italic" fo:font-weight="normal" style:font-name-asian="LiberationSerif" style:font-size-asian="10.5pt" style:font-style-asian="italic" style:font-weight-asian="normal" style:font-name-complex="LiberationSerif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4cm" svg:height="17.94cm" svg:x="16.65cm" svg:y="1.4cm" svg:viewBox="0 0 15 17941" draw:points="0,17941 0,0 15,0 15,17941">
          <text:p/>
        </draw:polygon>
        <draw:frame draw:style-name="gr2" draw:text-style-name="P3" draw:layer="layout" svg:width="6.666cm" svg:height="0.67cm" svg:x="2.5cm" svg:y="1.464cm">
          <draw:text-box>
            <text:p text:style-name="P2"><text:span text:style-name="T1">WHAT IS THIS THING?</text:span></text:p>
          </draw:text-box>
        </draw:frame>
        <draw:frame draw:style-name="gr3" draw:text-style-name="P4" draw:layer="layout" svg:width="9.068cm" svg:height="0.412cm" svg:x="2.5cm" svg:y="2.731cm">
          <draw:text-box>
            <text:p text:style-name="P2"><text:span text:style-name="T2">You're standing under the approach of the Buitenveldertbaan.</text:span></text:p>
          </draw:text-box>
        </draw:frame>
        <draw:frame draw:style-name="gr3" draw:text-style-name="P4" draw:layer="layout" svg:width="8.139cm" svg:height="0.412cm" svg:x="2.5cm" svg:y="3.22cm">
          <draw:text-box>
            <text:p text:style-name="P2"><text:span text:style-name="T2">One of Schiphol's runways ends a few kilometres west.</text:span></text:p>
          </draw:text-box>
        </draw:frame>
        <draw:frame draw:style-name="gr3" draw:text-style-name="P4" draw:layer="layout" svg:width="8.4cm" svg:height="0.412cm" svg:x="2.5cm" svg:y="3.989cm">
          <draw:text-box>
            <text:p text:style-name="P2"><text:span text:style-name="T2">When the wind is wrong (or right, depends who you ask)</text:span></text:p>
          </draw:text-box>
        </draw:frame>
        <draw:frame draw:style-name="gr3" draw:text-style-name="P4" draw:layer="layout" svg:width="6.896cm" svg:height="0.412cm" svg:x="2.5cm" svg:y="4.478cm">
          <draw:text-box>
            <text:p text:style-name="P2"><text:span text:style-name="T2">planes cross this exact spot every few minutes.</text:span></text:p>
          </draw:text-box>
        </draw:frame>
        <draw:frame draw:style-name="gr3" draw:text-style-name="P4" draw:layer="layout" svg:width="6.907cm" svg:height="0.412cm" svg:x="2.5cm" svg:y="4.967cm">
          <draw:text-box>
            <text:p text:style-name="P2"><text:span text:style-name="T2">About 200 to 250 metres up, sometimes lower.</text:span></text:p>
          </draw:text-box>
        </draw:frame>
        <draw:frame draw:style-name="gr3" draw:text-style-name="P4" draw:layer="layout" svg:width="9.177cm" svg:height="0.412cm" svg:x="2.5cm" svg:y="5.456cm">
          <draw:text-box>
            <text:p text:style-name="P2"><text:span text:style-name="T2">Low enough that at night their lights sweep across the ground.</text:span></text:p>
          </draw:text-box>
        </draw:frame>
        <draw:frame draw:style-name="gr3" draw:text-style-name="P4" draw:layer="layout" svg:width="3.884cm" svg:height="0.412cm" svg:x="2.5cm" svg:y="6.225cm">
          <draw:text-box>
            <text:p text:style-name="P2"><text:span text:style-name="T2">Some days it's 150 planes.</text:span></text:p>
          </draw:text-box>
        </draw:frame>
        <draw:frame draw:style-name="gr3" draw:text-style-name="P4" draw:layer="layout" svg:width="3.326cm" svg:height="0.412cm" svg:x="2.5cm" svg:y="6.714cm">
          <draw:text-box>
            <text:p text:style-name="P2"><text:span text:style-name="T2">Some days none at all.</text:span></text:p>
          </draw:text-box>
        </draw:frame>
        <draw:frame draw:style-name="gr3" draw:text-style-name="P4" draw:layer="layout" svg:width="5.044cm" svg:height="0.412cm" svg:x="2.5cm" svg:y="7.203cm">
          <draw:text-box>
            <text:p text:style-name="P2"><text:span text:style-name="T2">When they come we do not know.</text:span></text:p>
          </draw:text-box>
        </draw:frame>
        <draw:frame draw:style-name="gr3" draw:text-style-name="P4" draw:layer="layout" svg:width="6.553cm" svg:height="0.412cm" svg:x="2.5cm" svg:y="7.972cm">
          <draw:text-box>
            <text:p text:style-name="P2"><text:span text:style-name="T2">There's a lot of commotion about the flights.</text:span></text:p>
          </draw:text-box>
        </draw:frame>
        <draw:frame draw:style-name="gr3" draw:text-style-name="P4" draw:layer="layout" svg:width="4.134cm" svg:height="0.412cm" svg:x="2.5cm" svg:y="8.461cm">
          <draw:text-box>
            <text:p text:style-name="P2"><text:span text:style-name="T2">The noise, the air, the sleep.</text:span></text:p>
          </draw:text-box>
        </draw:frame>
        <draw:frame draw:style-name="gr3" draw:text-style-name="P4" draw:layer="layout" svg:width="6.9cm" svg:height="0.412cm" svg:x="2.5cm" svg:y="8.949cm">
          <draw:text-box>
            <text:p text:style-name="P2"><text:span text:style-name="T2">The homes that can't be built underneath them.</text:span></text:p>
          </draw:text-box>
        </draw:frame>
        <draw:frame draw:style-name="gr3" draw:text-style-name="P4" draw:layer="layout" svg:width="7.847cm" svg:height="0.412cm" svg:x="2.5cm" svg:y="9.438cm">
          <draw:text-box>
            <text:p text:style-name="P2"><text:span text:style-name="T2">But the rules that decide all this are based on models.</text:span></text:p>
          </draw:text-box>
        </draw:frame>
        <draw:frame draw:style-name="gr3" draw:text-style-name="P4" draw:layer="layout" svg:width="4.777cm" svg:height="0.412cm" svg:x="2.5cm" svg:y="9.927cm">
          <draw:text-box>
            <text:p text:style-name="P2"><text:span text:style-name="T2">Calculated, averaged, estimated.</text:span></text:p>
          </draw:text-box>
        </draw:frame>
        <draw:frame draw:style-name="gr3" draw:text-style-name="P4" draw:layer="layout" svg:width="5.229cm" svg:height="0.412cm" svg:x="2.5cm" svg:y="10.416cm">
          <draw:text-box>
            <text:p text:style-name="P2"><text:span text:style-name="T2">Not on measurements. Not on here.</text:span></text:p>
          </draw:text-box>
        </draw:frame>
        <draw:frame draw:style-name="gr3" draw:text-style-name="P4" draw:layer="layout" svg:width="5.06cm" svg:height="0.412cm" svg:x="2.5cm" svg:y="11.185cm">
          <draw:text-box>
            <text:p text:style-name="P2"><text:span text:style-name="T2">So we thought, fine, let's measure.</text:span></text:p>
          </draw:text-box>
        </draw:frame>
        <draw:frame draw:style-name="gr3" draw:text-style-name="P4" draw:layer="layout" svg:width="8.349cm" svg:height="0.412cm" svg:x="2.5cm" svg:y="11.674cm">
          <draw:text-box>
            <text:p text:style-name="P2"><text:span text:style-name="T2">Not that we distrust the models exactly. (Just a little bit.)</text:span></text:p>
          </draw:text-box>
        </draw:frame>
        <draw:frame draw:style-name="gr3" draw:text-style-name="P4" draw:layer="layout" svg:width="8.072cm" svg:height="0.412cm" svg:x="2.5cm" svg:y="12.163cm">
          <draw:text-box>
            <text:p text:style-name="P2"><text:span text:style-name="T2">It just seemed strange that nobody was, well, listening.</text:span></text:p>
          </draw:text-box>
        </draw:frame>
        <draw:frame draw:style-name="gr3" draw:text-style-name="P4" draw:layer="layout" svg:width="2.856cm" svg:height="0.412cm" svg:x="2.5cm" svg:y="12.932cm">
          <draw:text-box>
            <text:p text:style-name="P2"><text:span text:style-name="T2">This station listens.</text:span></text:p>
          </draw:text-box>
        </draw:frame>
        <draw:frame draw:style-name="gr3" draw:text-style-name="P4" draw:layer="layout" svg:width="9.309cm" svg:height="0.412cm" svg:x="2.5cm" svg:y="13.421cm">
          <draw:text-box>
            <text:p text:style-name="P2"><text:span text:style-name="T2">The antenna picks up radio signals from the planes themselves,</text:span></text:p>
          </draw:text-box>
        </draw:frame>
        <draw:frame draw:style-name="gr3" draw:text-style-name="P4" draw:layer="layout" svg:width="6.129cm" svg:height="0.412cm" svg:x="2.5cm" svg:y="13.91cm">
          <draw:text-box>
            <text:p text:style-name="P2"><text:span text:style-name="T2">each one announces who it is as it passes.</text:span></text:p>
          </draw:text-box>
        </draw:frame>
        <draw:frame draw:style-name="gr3" draw:text-style-name="P4" draw:layer="layout" svg:width="5.402cm" svg:height="0.412cm" svg:x="2.5cm" svg:y="14.399cm">
          <draw:text-box>
            <text:p text:style-name="P2"><text:span text:style-name="T2">There are sensors for dust, for gases,</text:span></text:p>
          </draw:text-box>
        </draw:frame>
        <draw:frame draw:style-name="gr3" draw:text-style-name="P4" draw:layer="layout" svg:width="3.857cm" svg:height="0.412cm" svg:x="2.5cm" svg:y="14.888cm">
          <draw:text-box>
            <text:p text:style-name="P2"><text:span text:style-name="T2">a microphone for the roar,</text:span></text:p>
          </draw:text-box>
        </draw:frame>
        <draw:frame draw:style-name="gr3" draw:text-style-name="P4" draw:layer="layout" svg:width="6.323cm" svg:height="0.412cm" svg:x="2.5cm" svg:y="15.377cm">
          <draw:text-box>
            <text:p text:style-name="P2"><text:span text:style-name="T2">weather sensors to keep everything honest.</text:span></text:p>
          </draw:text-box>
        </draw:frame>
        <draw:frame draw:style-name="gr3" draw:text-style-name="P4" draw:layer="layout" svg:width="6.527cm" svg:height="0.412cm" svg:x="2.5cm" svg:y="16.146cm">
          <draw:text-box>
            <text:p text:style-name="P2"><text:span text:style-name="T2">What will it teach us? No idea yet, honestly.</text:span></text:p>
          </draw:text-box>
        </draw:frame>
        <draw:frame draw:style-name="gr3" draw:text-style-name="P4" draw:layer="layout" svg:width="8.277cm" svg:height="0.412cm" svg:x="2.5cm" svg:y="16.635cm">
          <draw:text-box>
            <text:p text:style-name="P2"><text:span text:style-name="T2">Maybe the peaks in the graphs line up with the flyovers.</text:span></text:p>
          </draw:text-box>
        </draw:frame>
        <draw:frame draw:style-name="gr3" draw:text-style-name="P4" draw:layer="layout" svg:width="2.656cm" svg:height="0.412cm" svg:x="2.5cm" svg:y="17.124cm">
          <draw:text-box>
            <text:p text:style-name="P2"><text:span text:style-name="T2">Maybe they don't.</text:span></text:p>
          </draw:text-box>
        </draw:frame>
        <draw:frame draw:style-name="gr3" draw:text-style-name="P4" draw:layer="layout" svg:width="3.269cm" svg:height="0.412cm" svg:x="2.5cm" svg:y="17.613cm">
          <draw:text-box>
            <text:p text:style-name="P2"><text:span text:style-name="T2">That's the experiment.</text:span></text:p>
          </draw:text-box>
        </draw:frame>
        <draw:frame draw:style-name="gr4" draw:text-style-name="P5" draw:layer="layout" svg:width="14.25cm" svg:height="0.412cm" svg:x="2.5cm" svg:y="18.402cm">
          <draw:text-box>
            <text:p text:style-name="P2"><text:span text:style-name="T3">Measuring since June 2026. Every number on the screen was measured right here,</text:span></text:p>
          </draw:text-box>
        </draw:frame>
        <draw:frame draw:style-name="gr5" draw:text-style-name="P5" draw:layer="layout" svg:width="4.5cm" svg:height="0.412cm" svg:x="2.5cm" svg:y="18.891cm">
          <draw:text-box>
            <text:p text:style-name="P2"><text:span text:style-name="T3">by these electronics.</text:span></text:p>
          </draw:text-box>
        </draw:frame>
        <draw:frame draw:style-name="gr2" draw:text-style-name="P3" draw:layer="layout" svg:width="3.677cm" svg:height="0.67cm" svg:x="17.564cm" svg:y="1.464cm">
          <draw:text-box>
            <text:p text:style-name="P2"><text:span text:style-name="T1">WAT IS DIT?</text:span></text:p>
          </draw:text-box>
        </draw:frame>
        <draw:frame draw:style-name="gr3" draw:text-style-name="P4" draw:layer="layout" svg:width="8.49cm" svg:height="0.412cm" svg:x="17.564cm" svg:y="2.731cm">
          <draw:text-box>
            <text:p text:style-name="P2"><text:span text:style-name="T2">Je staat onder de aanvliegroute van de Buitenveldertbaan.</text:span></text:p>
          </draw:text-box>
        </draw:frame>
        <draw:frame draw:style-name="gr3" draw:text-style-name="P4" draw:layer="layout" svg:width="11.057cm" svg:height="0.412cm" svg:x="17.564cm" svg:y="3.22cm">
          <draw:text-box>
            <text:p text:style-name="P2"><text:span text:style-name="T2">Een van de banen van Schiphol eindigt een paar kilometer naar het westen.</text:span></text:p>
          </draw:text-box>
        </draw:frame>
        <draw:frame draw:style-name="gr3" draw:text-style-name="P4" draw:layer="layout" svg:width="9.717cm" svg:height="0.412cm" svg:x="17.564cm" svg:y="3.989cm">
          <draw:text-box>
            <text:p text:style-name="P2"><text:span text:style-name="T2">Als de wind verkeerd staat (of goed, het is maar wie je het vraagt)</text:span></text:p>
          </draw:text-box>
        </draw:frame>
        <draw:frame draw:style-name="gr3" draw:text-style-name="P4" draw:layer="layout" svg:width="9.953cm" svg:height="0.412cm" svg:x="17.564cm" svg:y="4.478cm">
          <draw:text-box>
            <text:p text:style-name="P2"><text:span text:style-name="T2">komen de vliegtuigen hier elke paar minuten precies over ons heen.</text:span></text:p>
          </draw:text-box>
        </draw:frame>
        <draw:frame draw:style-name="gr3" draw:text-style-name="P4" draw:layer="layout" svg:width="5.704cm" svg:height="0.412cm" svg:x="17.564cm" svg:y="4.967cm">
          <draw:text-box>
            <text:p text:style-name="P2"><text:span text:style-name="T2">Op zo'n 200 tot 250 meter, soms lager.</text:span></text:p>
          </draw:text-box>
        </draw:frame>
        <draw:frame draw:style-name="gr3" draw:text-style-name="P4" draw:layer="layout" svg:width="8.936cm" svg:height="0.412cm" svg:x="17.564cm" svg:y="5.456cm">
          <draw:text-box>
            <text:p text:style-name="P2"><text:span text:style-name="T2">Laag genoeg dat 's nachts hun lichten over de grond strijken.</text:span></text:p>
          </draw:text-box>
        </draw:frame>
        <draw:frame draw:style-name="gr3" draw:text-style-name="P4" draw:layer="layout" svg:width="3.96cm" svg:height="0.412cm" svg:x="17.564cm" svg:y="6.225cm">
          <draw:text-box>
            <text:p text:style-name="P2"><text:span text:style-name="T2">De ene dag zijn het er 150.</text:span></text:p>
          </draw:text-box>
        </draw:frame>
        <draw:frame draw:style-name="gr3" draw:text-style-name="P4" draw:layer="layout" svg:width="3.611cm" svg:height="0.412cm" svg:x="17.564cm" svg:y="6.714cm">
          <draw:text-box>
            <text:p text:style-name="P2"><text:span text:style-name="T2">De andere dag geen een.</text:span></text:p>
          </draw:text-box>
        </draw:frame>
        <draw:frame draw:style-name="gr3" draw:text-style-name="P4" draw:layer="layout" svg:width="5.76cm" svg:height="0.412cm" svg:x="17.564cm" svg:y="7.203cm">
          <draw:text-box>
            <text:p text:style-name="P2"><text:span text:style-name="T2">Wanneer ze komen weten wij ook niet.</text:span></text:p>
          </draw:text-box>
        </draw:frame>
        <draw:frame draw:style-name="gr3" draw:text-style-name="P4" draw:layer="layout" svg:width="5.003cm" svg:height="0.412cm" svg:x="17.564cm" svg:y="7.972cm">
          <draw:text-box>
            <text:p text:style-name="P2"><text:span text:style-name="T2">Er is veel gedoe over de vluchten.</text:span></text:p>
          </draw:text-box>
        </draw:frame>
        <draw:frame draw:style-name="gr3" draw:text-style-name="P4" draw:layer="layout" svg:width="4.42cm" svg:height="0.412cm" svg:x="17.564cm" svg:y="8.461cm">
          <draw:text-box>
            <text:p text:style-name="P2"><text:span text:style-name="T2">Het lawaai, de lucht, de slaap.</text:span></text:p>
          </draw:text-box>
        </draw:frame>
        <draw:frame draw:style-name="gr3" draw:text-style-name="P4" draw:layer="layout" svg:width="7.734cm" svg:height="0.412cm" svg:x="17.564cm" svg:y="8.949cm">
          <draw:text-box>
            <text:p text:style-name="P2"><text:span text:style-name="T2">De huizen die eronder niet gebouwd mogen worden.</text:span></text:p>
          </draw:text-box>
        </draw:frame>
        <draw:frame draw:style-name="gr3" draw:text-style-name="P4" draw:layer="layout" svg:width="10.075cm" svg:height="0.412cm" svg:x="17.564cm" svg:y="9.438cm">
          <draw:text-box>
            <text:p text:style-name="P2"><text:span text:style-name="T2">Maar de regels die dat allemaal bepalen zijn gebaseerd op modellen.</text:span></text:p>
          </draw:text-box>
        </draw:frame>
        <draw:frame draw:style-name="gr3" draw:text-style-name="P4" draw:layer="layout" svg:width="4.533cm" svg:height="0.412cm" svg:x="17.564cm" svg:y="9.927cm">
          <draw:text-box>
            <text:p text:style-name="P2"><text:span text:style-name="T2">Berekend, gemiddeld, geschat.</text:span></text:p>
          </draw:text-box>
        </draw:frame>
        <draw:frame draw:style-name="gr3" draw:text-style-name="P4" draw:layer="layout" svg:width="4.594cm" svg:height="0.412cm" svg:x="17.564cm" svg:y="10.416cm">
          <draw:text-box>
            <text:p text:style-name="P2"><text:span text:style-name="T2">Niet op metingen. Niet op hier.</text:span></text:p>
          </draw:text-box>
        </draw:frame>
        <draw:frame draw:style-name="gr3" draw:text-style-name="P4" draw:layer="layout" svg:width="6.762cm" svg:height="0.412cm" svg:x="17.564cm" svg:y="11.185cm">
          <draw:text-box>
            <text:p text:style-name="P2"><text:span text:style-name="T2">Dus dachten we, goed, dan meten we het zelf.</text:span></text:p>
          </draw:text-box>
        </draw:frame>
        <draw:frame draw:style-name="gr3" draw:text-style-name="P4" draw:layer="layout" svg:width="10.249cm" svg:height="0.412cm" svg:x="17.564cm" svg:y="11.674cm">
          <draw:text-box>
            <text:p text:style-name="P2"><text:span text:style-name="T2">Niet dat we de modellen wantrouwen. (Ok misschien wel een beetje.)</text:span></text:p>
          </draw:text-box>
        </draw:frame>
        <draw:frame draw:style-name="gr3" draw:text-style-name="P4" draw:layer="layout" svg:width="8.838cm" svg:height="0.412cm" svg:x="17.564cm" svg:y="12.163cm">
          <draw:text-box>
            <text:p text:style-name="P2"><text:span text:style-name="T2">Het voelde alleen gek dat niemand gewoon eens... luisterde.</text:span></text:p>
          </draw:text-box>
        </draw:frame>
        <draw:frame draw:style-name="gr3" draw:text-style-name="P4" draw:layer="layout" svg:width="2.754cm" svg:height="0.412cm" svg:x="17.564cm" svg:y="12.932cm">
          <draw:text-box>
            <text:p text:style-name="P2"><text:span text:style-name="T2">Dit station luistert.</text:span></text:p>
          </draw:text-box>
        </draw:frame>
        <draw:frame draw:style-name="gr3" draw:text-style-name="P4" draw:layer="layout" svg:width="8.664cm" svg:height="0.412cm" svg:x="17.564cm" svg:y="13.421cm">
          <draw:text-box>
            <text:p text:style-name="P2"><text:span text:style-name="T2">De antenne vangt radiosignalen op van de vliegtuigen zelf,</text:span></text:p>
          </draw:text-box>
        </draw:frame>
        <draw:frame draw:style-name="gr3" draw:text-style-name="P4" draw:layer="layout" svg:width="6.906cm" svg:height="0.412cm" svg:x="17.564cm" svg:y="13.91cm">
          <draw:text-box>
            <text:p text:style-name="P2"><text:span text:style-name="T2">elk toestel vertelt in het voorbijgaan wie het is.</text:span></text:p>
          </draw:text-box>
        </draw:frame>
        <draw:frame draw:style-name="gr3" draw:text-style-name="P4" draw:layer="layout" svg:width="5.812cm" svg:height="0.412cm" svg:x="17.564cm" svg:y="14.399cm">
          <draw:text-box>
            <text:p text:style-name="P2"><text:span text:style-name="T2">Er zijn sensoren voor stof, voor gassen,</text:span></text:p>
          </draw:text-box>
        </draw:frame>
        <draw:frame draw:style-name="gr3" draw:text-style-name="P4" draw:layer="layout" svg:width="4.573cm" svg:height="0.412cm" svg:x="17.564cm" svg:y="14.888cm">
          <draw:text-box>
            <text:p text:style-name="P2"><text:span text:style-name="T2">een microfoon voor het geraas,</text:span></text:p>
          </draw:text-box>
        </draw:frame>
        <draw:frame draw:style-name="gr3" draw:text-style-name="P4" draw:layer="layout" svg:width="5.995cm" svg:height="0.412cm" svg:x="17.564cm" svg:y="15.377cm">
          <draw:text-box>
            <text:p text:style-name="P2"><text:span text:style-name="T2">weersensoren om alles eerlijk te houden.</text:span></text:p>
          </draw:text-box>
        </draw:frame>
        <draw:frame draw:style-name="gr3" draw:text-style-name="P4" draw:layer="layout" svg:width="8.397cm" svg:height="0.412cm" svg:x="17.564cm" svg:y="16.146cm">
          <draw:text-box>
            <text:p text:style-name="P2"><text:span text:style-name="T2">Wat gaan we ervan leren? Nog geen idee, eerlijk gezegd.</text:span></text:p>
          </draw:text-box>
        </draw:frame>
        <draw:frame draw:style-name="gr3" draw:text-style-name="P4" draw:layer="layout" svg:width="10.28cm" svg:height="0.412cm" svg:x="17.564cm" svg:y="16.635cm">
          <draw:text-box>
            <text:p text:style-name="P2"><text:span text:style-name="T2">Misschien vallen de pieken in de grafieken samen met de vliegtuigen.</text:span></text:p>
          </draw:text-box>
        </draw:frame>
        <draw:frame draw:style-name="gr3" draw:text-style-name="P4" draw:layer="layout" svg:width="2.897cm" svg:height="0.412cm" svg:x="17.564cm" svg:y="17.124cm">
          <draw:text-box>
            <text:p text:style-name="P2"><text:span text:style-name="T2">Misschien ook niet.</text:span></text:p>
          </draw:text-box>
        </draw:frame>
        <draw:frame draw:style-name="gr3" draw:text-style-name="P4" draw:layer="layout" svg:width="3.254cm" svg:height="0.412cm" svg:x="17.564cm" svg:y="17.613cm">
          <draw:text-box>
            <text:p text:style-name="P2"><text:span text:style-name="T2">Dat is het experiment.</text:span></text:p>
          </draw:text-box>
        </draw:frame>
        <draw:frame draw:style-name="gr3" draw:text-style-name="P4" draw:layer="layout" svg:width="9.269cm" svg:height="0.412cm" svg:x="17.564cm" svg:y="18.402cm">
          <draw:text-box>
            <text:p text:style-name="P2"><text:span text:style-name="T3">Meet sinds juni 2026. Elk getal op het scherm is hier gemeten, </text:span></text:p>
          </draw:text-box>
        </draw:frame>
        <draw:frame draw:style-name="gr5" draw:text-style-name="P5" draw:layer="layout" svg:width="4.5cm" svg:height="0.412cm" svg:x="17.6cm" svg:y="18.9cm">
          <draw:text-box>
            <text:p text:style-name="P2"><text:span text:style-name="T3">door deze electronic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-Serif" svg:font-family="Liberation-Serif"/>
    <style:font-face style:name="LiberationSerif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2.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1T15:55:34.492389867</dc:date>
    <meta:editing-duration>PT5M43S</meta:editing-duration>
    <meta:editing-cycles>1</meta:editing-cycles>
    <meta:document-statistic meta:object-count="63"/>
    <meta:generator>LibreOffice/26.2.4.2$Linux_X86_64 LibreOffice_project/620$Build-2</meta:generator>
  </office:meta>
</office:document-meta>
</file>